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1000003B17D656F0F.png" manifest:media-type="image/png"/>
  <manifest:file-entry manifest:full-path="Pictures/100000010000017C000003568461902D.png" manifest:media-type="image/png"/>
  <manifest:file-entry manifest:full-path="Pictures/10000001000001E1000003BDAC5A9006.png" manifest:media-type="image/png"/>
  <manifest:file-entry manifest:full-path="Pictures/10000001000001790000035C8FA98000.png" manifest:media-type="image/png"/>
  <manifest:file-entry manifest:full-path="Pictures/10000001000005CE0000023C3AE401F0.png" manifest:media-type="image/png"/>
  <manifest:file-entry manifest:full-path="Pictures/10000001000007080000041A46CFF3C7.png" manifest:media-type="image/png"/>
  <manifest:file-entry manifest:full-path="Pictures/10000001000007CF000004F9232EF82D.png" manifest:media-type="image/png"/>
  <manifest:file-entry manifest:full-path="Pictures/1000000100000456000003E13ADA02D2.png" manifest:media-type="image/png"/>
  <manifest:file-entry manifest:full-path="Pictures/1000000100000188000003348A8CEA37.png" manifest:media-type="image/png"/>
  <manifest:file-entry manifest:full-path="Pictures/100000010000017C0000036D432AF0A3.png" manifest:media-type="image/png"/>
  <manifest:file-entry manifest:full-path="Pictures/10000001000004F80000003D4CB038DA.png" manifest:media-type="image/png"/>
  <manifest:file-entry manifest:full-path="Pictures/10000001000004CE000002446E470E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9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24.6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cm" fo:min-width="23.13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33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6cm" fo:min-width="27.8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7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27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27.4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98cm" fo:min-width="27.487cm" loext:decorative="false"/>
      <style:paragraph-properties style:writing-mode="lr-tb"/>
    </style:style>
    <style:style style:name="pr1" style:family="presentation" style:parent-style-name="Default-title">
      <style:graphic-properties fo:min-height="8.473cm" loext:decorative="false"/>
      <style:paragraph-properties style:writing-mode="lr-tb"/>
    </style:style>
    <style:style style:name="pr2" style:family="presentation" style:parent-style-name="Default-title">
      <style:graphic-properties fo:min-height="3.7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reeMono" fo:font-size="80pt" fo:font-weight="bold" style:font-size-asian="80pt" style:font-size-complex="80pt"/>
    </style:style>
    <style:style style:name="P2" style:family="paragraph">
      <style:text-properties style:font-name="FreeMono" fo:font-size="42pt" fo:font-weight="bold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Ubuntu Sans" fo:font-weight="bold" style:font-weight-asian="bold" style:font-weight-complex="bold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margin-left="0cm" fo:margin-right="0cm" fo:margin-top="0.051cm" fo:margin-bottom="0cm" fo:text-indent="0cm"/>
      <style:text-properties fo:hyphenate="false" loext:hyphenation-no-caps="false" loext:hyphenation-no-last-word="false"/>
    </style:style>
    <style:style style:name="P8" style:family="paragraph">
      <style:text-properties style:font-name="FreeMono"/>
    </style:style>
    <style:style style:name="P9" style:family="paragraph">
      <style:paragraph-properties fo:margin-top="0.051cm" fo:margin-bottom="0cm"/>
    </style:style>
    <style:style style:name="P10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8pt"/>
    </style:style>
    <style:style style:name="P11" style:family="paragraph">
      <style:text-properties style:font-name="DejaVu Sans"/>
    </style:style>
    <style:style style:name="P12" style:family="paragraph">
      <style:paragraph-properties fo:margin-left="0cm" fo:margin-right="0cm" fo:margin-top="0.051cm" fo:margin-bottom="0cm" fo:line-height="100%" fo:text-indent="0cm"/>
    </style:style>
    <style:style style:name="P13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/>
    </style:style>
    <style:style style:name="P15" style:family="paragraph">
      <loext:graphic-properties draw:fill="none" draw:fill-color="#ffffff"/>
      <style:paragraph-properties fo:margin-left="0cm" fo:margin-right="0cm" fo:margin-top="0.051cm" fo:margin-bottom="0cm" fo:line-height="100%" fo:text-indent="0cm"/>
      <style:text-properties fo:color="#43ef16" loext:opacity="100%" style:font-name="DejaVu Sans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style:font-name="Ubuntu Sans" fo:font-size="18pt" style:font-size-asian="18pt" style:font-size-complex="18pt"/>
    </style:style>
    <style:style style:name="T1" style:family="text">
      <style:text-properties style:font-name="FreeMono" fo:font-size="80pt" fo:font-weight="bold" style:font-size-asian="80pt" style:font-size-complex="80pt"/>
    </style:style>
    <style:style style:name="T2" style:family="text">
      <style:text-properties style:font-name="FreeMono" fo:font-size="42pt" fo:font-weight="bold" style:font-size-asian="42pt" style:font-size-complex="42pt"/>
    </style:style>
    <style:style style:name="T3" style:family="text">
      <style:text-properties style:font-name="Ubuntu Sans" fo:font-weight="bold" style:font-weight-asian="bold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"/>
    </style:style>
    <style:style style:name="T7" style:family="text">
      <style:text-properties fo:color="#43ef16" loext:opacity="100%" style:font-name="DejaVu Sans" fo:font-size="10pt" style:font-size-asian="10pt" style:font-size-complex="10pt"/>
    </style:style>
    <style:style style:name="T8" style:family="text">
      <style:text-properties style:font-name="Ubuntu Sans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style:font-name="Ubunt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8.473cm" svg:x="0.635cm" svg:y="1.404cm" presentation:class="title" presentation:user-transformed="true">
          <draw:text-box>
            <text:p><text:span text:style-name="T1">Punking Up Dependency Hell</text:span></text:p>
          </draw:text-box>
        </draw:frame>
        <draw:frame presentation:style-name="pr2" draw:text-style-name="P2" draw:layer="layout" svg:width="26.67cm" svg:height="3.718cm" svg:x="0.635cm" svg:y="9.76cm" presentation:class="title" presentation:user-transformed="true">
          <draw:text-box>
            <text:p><text:span text:style-name="T2">Benoit Baudry</text:span><text:span text:style-name="T2"><text:line-break/></text:span><text:span text:style-name="T2">Université de Montréal</text:span></text:p>
          </draw:text-box>
        </draw:frame>
        <draw:frame draw:style-name="gr1" draw:text-style-name="P3" draw:layer="layout" svg:width="5.591cm" svg:height="2.637cm" svg:x="1.27cm" svg:y="13.438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27.99cm" svg:height="13.198cm" svg:x="28.042cm" svg:y="1.062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19.36cm" svg:height="0.926cm" svg:x="7.31cm" svg:y="14.416cm">
          <draw:image xlink:href="Pictures/10000001000004F80000003D4CB03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draw:style-name="gr1" draw:text-style-name="P3" draw:layer="layout" svg:width="4.371cm" svg:height="9.545cm" svg:x="0.636cm" svg:y="5.911cm">
          <draw:image xlink:href="Pictures/1000000100000188000003348A8CEA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Software supply chain</text:span></text:p>
          </draw:text-box>
        </draw:frame>
        <draw:frame draw:style-name="gr1" draw:text-style-name="P3" draw:layer="layout" svg:width="4.371cm" svg:height="9.545cm" svg:x="0.635cm" svg:y="5.91cm">
          <draw:image xlink:href="Pictures/1000000100000188000003348A8CEA37.png" xlink:type="simple" xlink:show="embed" xlink:actuate="onLoad" draw:mime-type="image/png">
            <text:p/>
          </draw:image>
        </draw:frame>
        <draw:frame draw:style-name="gr1" draw:text-style-name="P3" draw:layer="layout" svg:width="22.299cm" svg:height="14.819cm" svg:x="5.006cm" svg:y="0.635cm">
          <draw:image xlink:href="Pictures/10000001000007CF000004F9232EF8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645cm" svg:height="13.208cm" svg:x="0.337cm" svg:y="2.54cm">
          <draw:image xlink:href="Pictures/10000001000007080000041A46CFF3C7.png" xlink:type="simple" xlink:show="embed" xlink:actuate="onLoad" draw:mime-type="image/png">
            <text:p/>
          </draw:image>
        </draw:frame>
        <draw:frame presentation:style-name="pr4" draw:text-style-name="P5" draw:layer="layout" svg:width="25.191cm" svg:height="2.629cm" svg:x="1.399cm" svg:y="0.627cm" presentation:class="title">
          <draw:text-box>
            <text:p><text:span text:style-name="T3">Software Supply Chain</text:span></text:p>
          </draw:text-box>
        </draw:frame>
        <draw:frame presentation:style-name="pr6" draw:text-style-name="P6" draw:layer="layout" svg:width="21.625cm" svg:height="6.876cm" svg:x="5.68cm" svg:y="3.919cm" presentation:class="outline" presentation:user-transformed="true">
          <draw:text-box>
            <text:list text:style-name="L2">
              <text:list-header>
                <text:p><text:span text:style-name="T4">Dependencies ripple</text:span></text:p>
                <text:p><text:span text:style-name="T5">Third-party libraries, code analysis tools, continuous integration</text:span></text:p>
                <text:p><text:span text:style-name="T4">Open source projects</text:span></text:p>
                <text:p><text:span text:style-name="T4">Monocultur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Security</text:span></text:p>
          </draw:text-box>
        </draw:frame>
        <draw:frame presentation:style-name="pr6" draw:text-style-name="P8" draw:layer="layout" svg:width="25.191cm" svg:height="9.616cm" svg:x="1.399cm" svg:y="3.684cm" presentation:class="outline" presentation:user-transformed="true">
          <draw:text-box>
            <text:list text:style-name="L2">
              <text:list-item>
                <text:p><text:span text:style-name="T6">Trusting trust</text:span></text:p>
                <text:list>
                  <text:list-item>
                    <text:p>Trojan in compiler</text:p>
                  </text:list-item>
                  <text:list-item>
                    <text:p>Malicious CI, e.g. Solarwinds</text:p>
                  </text:list-item>
                </text:list>
              </text:list-item>
              <text:list-item>
                <text:p><text:span text:style-name="T6">Tampering with reusable components</text:span></text:p>
                <text:list>
                  <text:list-item>
                    <text:p>Third-party libraries, e.g, Codecov, log4J, event-stream, xz</text:p>
                  </text:list-item>
                  <text:list-item>
                    <text:p text:style-name="P7">Github actions, e.g., tj-action</text:p>
                  </text:list-item>
                  <text:list-item>
                    <text:p>Typosquatting, e.g., Python packages, Minecraft mods</text:p>
                  </text:list-item>
                </text:list>
              </text:list-item>
              <text:list-item>
                <text:p>AI amplification</text:p>
                <text:list>
                  <text:list-item>
                    <text:p>Larger software supply chain (pre-trained models, agents, etc.)</text:p>
                  </text:list-item>
                  <text:list-item>
                    <text:p text:style-name="P7">Reduce time to exploitation</text:p>
                  </text:list-item>
                  <text:list-item>
                    <text:p>Agents operate with high privileges that can be exploited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495cm" svg:height="2.54cm" svg:x="0cm" svg:y="13.3cm">
          <draw:text-box>
            <text:p text:style-name="P9"><text:span text:style-name="T7">Thompson, Ken. "Reflections on trusting trust." Communications of the ACM 1984.</text:span></text:p>
            <text:p text:style-name="P9"><text:span text:style-name="T7">Ladisa, Piergiorgio, et al. "Sok: Taxonomy of attacks on open-source software supply chains." IEEE S&amp;P 2023.</text:span></text:p>
            <text:p text:style-name="P9"><text:span text:style-name="T7">Neupane, Shradha, et al. "Beyond typosquatting: an in-depth look at package confusion." USENIX security 2023.</text:span></text:p>
            <text:p text:style-name="P9"><text:span text:style-name="T7">Williams, Laurie, et al. "Research directions in software supply chain security." ACM TOSEM 2025.</text:span></text:p>
            <text:p text:style-name="P9"><text:span text:style-name="T7">Fares, Madjda, Yogya Gamage, and Benoit Baudry. "Unpacking Security Scanners for GitHub Actions Workflows." arXiv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Reliability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Conflicting dependencies</text:span></text:p>
                <text:list>
                  <text:list-item>
                    <text:p>Black-box resolution algorithms</text:p>
                  </text:list-item>
                  <text:list-item>
                    <text:p>Pinning vs. floating</text:p>
                  </text:list-item>
                </text:list>
              </text:list-item>
              <text:list-item>
                <text:p><text:span text:style-name="T6">Breaking dependencies</text:span></text:p>
                <text:list>
                  <text:list-item>
                    <text:p>Incorrect dependencies</text:p>
                  </text:list-item>
                  <text:list-item>
                    <text:p>Breaking updates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7.94cm" svg:height="1.586cm" svg:x="0cm" svg:y="14.105cm">
          <draw:text-box>
            <text:p text:style-name="P9"><text:span text:style-name="T7">Wang, Ying, et al. "Will dependency conflicts affect my program's semantics?." IEEE TSE 2021</text:span></text:p>
            <text:p text:style-name="P9"><text:span text:style-name="T7">Venturini, Daniel, et al. "I depended on you and you broke me: An empirical study of manifesting breaking changes in client packages." ACM TOSEM 2023.</text:span></text:p>
            <text:p text:style-name="P12"><text:span text:style-name="T7">Jayasuriya, Dhanushka, et al. "Understanding the impact of APIs behavioral breaking changes on client applications." FSE 2024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Human aspects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8">Pressure on OSS developers</text:span></text:p>
                <text:list>
                  <text:list-item>
                    <text:p>OSS developers quit and remove, e.g., left-pad</text:p>
                  </text:list-item>
                  <text:list-item>
                    <text:p>OSS developers pressured to accept changes, e.g., xz</text:p>
                  </text:list-item>
                </text:list>
              </text:list-item>
              <text:list-item>
                <text:p>Political activism</text:p>
                <text:list>
                  <text:list-item>
                    <text:p text:style-name="P7">OSS developers protest through their packages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25.109cm" svg:height="1.586cm" svg:x="0cm" svg:y="14.647cm">
          <draw:text-box>
            <text:p text:style-name="P9"><text:span text:style-name="T7">Mens, Tom. "An ecosystemic and socio-technical view on software maintenance and evolution." ICSME 2016</text:span></text:p>
            <text:p text:style-name="P9"><text:span text:style-name="T7">Kula, Raula Gaikovina, and Christoph Treude. "In war and peace: the impact of world politics on software ecosystems." ESEC / FSE 2022.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Reliability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Compatibility testing </text:span></text:p>
                <text:list>
                  <text:list-item>
                    <text:p>Target test generation on client – library usages</text:p>
                  </text:list-item>
                  <text:list-item>
                    <text:p>Benchmark library updates with a pool of clients</text:p>
                  </text:list-item>
                  <text:list-item>
                    <text:p>Dependency graph analysis for remediation</text:p>
                  </text:list-item>
                </text:list>
              </text:list-item>
              <text:list-item>
                <text:p>Fixing breaking updates</text:p>
                <text:list>
                  <text:list-item>
                    <text:p>Diff on dependency versions</text:p>
                  </text:list-item>
                  <text:list-item>
                    <text:p>Client code analysis</text:p>
                  </text:list-item>
                  <text:list-item>
                    <text:p>Patch generation</text:p>
                  </text:list-item>
                  <text:list-item>
                    <text:p>Update transformation generation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3.639cm" svg:height="2.51cm" svg:x="0cm" svg:y="13.347cm">
          <draw:text-box>
            <text:p text:style-name="P9"><text:span text:style-name="T7">Chen, Lingchao, et al. "Taming behavioral backward incompatibilities via cross-project testing and analysis." ICSE 2020.</text:span></text:p>
            <text:p text:style-name="P9"><text:span text:style-name="T7">Zhang, Lyuye, et al. "Compatible remediation on vulnerabilities from third-party libraries for java projects." ICSE 2023.</text:span></text:p>
            <text:p text:style-name="P9"><text:span text:style-name="T7">Zhong, Hao, and Na Meng. "Compiler-directed migrating API callsite of client code." ICSE 2024.</text:span></text:p>
            <text:p text:style-name="P9"><text:span text:style-name="T7">Fruntke, Lukas, and Jens Krinke. "Automatically fixing dependency breaking changes." FSE 2025.</text:span></text:p>
            <text:p text:style-name="P9"><text:span text:style-name="T7">Reyes, Frank, et al. "Byam: Fixing breaking dependency updates with large language model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6">Transparency</text:span></text:p>
              </text:list-item>
              <text:list-item>
                <text:p>Integrity</text:p>
              </text:list-item>
              <text:list-item>
                <text:p>Provenance</text:p>
              </text:list-item>
              <text:list-item>
                <text:p>Signing</text:p>
                <text:p/>
              </text:list-item>
            </text:list>
          </draw:text-box>
        </draw:frame>
        <draw:frame draw:style-name="gr7" draw:text-style-name="P15" draw:layer="layout" svg:width="27.836cm" svg:height="2.048cm" svg:x="0cm" svg:y="13.747cm">
          <draw:text-box>
            <text:p text:style-name="P12"><text:span text:style-name="T7">Torres-Arias, Santiago, et al. "in-toto: Providing farm-to-table guarantees for bits and bytes." 28th USENIX Security Symposium (USENIX Security 19). 2019.</text:span></text:p>
            <text:p text:style-name="P12"><text:span text:style-name="T7">Schorlemmer, Taylor R., et al. "Signing in four public software package registries: Quantity, quality, and influencing factors." IEEE S&amp;P 2024.</text:span></text:p>
            <text:p text:style-name="P12"><text:span text:style-name="T7">Mohayeji, Hamid, et al. "Securing dependencies: A comprehensive study of Dependabot’s impact on vulnerability mitigation." EMSE 2025.</text:span></text:p>
            <text:p text:style-name="P12"><text:span text:style-name="T7">Gamage, Yogya, et al. "The design space of lockfiles across package managers." EMSE 2026.</text:span></text:p>
          </draw:text-box>
        </draw:frame>
        <draw:frame draw:style-name="gr8" draw:text-style-name="P16" draw:layer="layout" svg:width="11.43cm" svg:height="10.225cm" svg:x="13.97cm" svg:y="3.11cm">
          <draw:image xlink:href="Pictures/1000000100000456000003E13ADA02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6">Reproducible builds</text:span></text:p>
                <text:list>
                  <text:list-item>
                    <text:p>Concurrency</text:p>
                  </text:list-item>
                  <text:list-item>
                    <text:p>Environment specificities</text:p>
                  </text:list-item>
                </text:list>
              </text:list-item>
              <text:list-item>
                <text:p>Canonicalization</text:p>
              </text:list-item>
              <text:list-item>
                <text:p>Diverse compilers</text:p>
              </text:list-item>
            </text:list>
          </draw:text-box>
        </draw:frame>
        <draw:frame draw:style-name="gr9" draw:text-style-name="P15" draw:layer="layout" svg:width="28.354cm" svg:height="2.51cm" svg:x="0cm" svg:y="13.335cm">
          <draw:text-box>
            <text:p text:style-name="P12"><text:span text:style-name="T7">Wheeler, David A. "Countering trusting trust through diverse double-compiling." ACSAC 2005.</text:span></text:p>
            <text:p text:style-name="P12"><text:span text:style-name="T7">Lamb, Chris, and Stefano Zacchiroli. "Reproducible builds: Increasing the integrity of software supply chains." IEEE Software 2021.</text:span></text:p>
            <text:p text:style-name="P12"><text:span text:style-name="T7">Fourné, Marcel, et al."It’s like flossing your teeth: On the importance and challenges of reproducible builds for software supply chain security." IEEE S&amp;P 2023.</text:span></text:p>
            <text:p text:style-name="P12"><text:span text:style-name="T7">Dietrich, Jens, and Behnaz Hassanshahi. "DALEQ--Explainable Equivalence for Java Bytecode." ASE 2025.</text:span></text:p>
            <text:p text:style-name="P12"><text:span text:style-name="T7">Sharma, Aman, Benoit Baudry, and Martin Monperrus. "Causes and Canonicalization of Unreproducible Builds in Java." IEEE TSE 2025.</text:span></text:p>
          </draw:text-box>
        </draw:frame>
        <draw:frame draw:style-name="gr8" draw:text-style-name="P16" draw:layer="layout" svg:width="6.35cm" svg:height="12.637cm" svg:x="19.05cm" svg:y="0.922cm">
          <draw:image xlink:href="Pictures/10000001000001E1000003BDAC5A90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Oversized Supply Chain</text:span></text:p>
          </draw:text-box>
        </draw:frame>
        <draw:frame presentation:style-name="pr6" draw:text-style-name="P11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<text:span text:style-name="T6">Package managers simplify reuse</text:span></text:p>
              </text:list-item>
              <text:list-item>
                <text:p><text:span text:style-name="T6">And we reuse too much</text:span></text:p>
                <text:p><text:span text:style-name="T6"/></text:p>
              </text:list-item>
            </text:list>
          </draw:text-box>
        </draw:frame>
        <draw:frame draw:style-name="gr10" draw:text-style-name="P14" draw:layer="layout" svg:width="27.94cm" svg:height="1.124cm" svg:x="0.051cm" svg:y="14.605cm">
          <draw:text-box>
            <text:p text:style-name="P9"><text:span text:style-name="T7">Soto-Valero, César, Thomas Durieux, and Benoit Baudry. "A longitudinal analysis of bloated java dependencies." ESEC/FSE 2021.</text:span></text:p>
            <text:p text:style-name="P9"><text:span text:style-name="T7"/></text:p>
          </draw:text-box>
        </draw:frame>
        <draw:frame draw:style-name="gr8" draw:text-style-name="P16" draw:layer="layout" svg:width="22.225cm" svg:height="8.555cm" svg:x="2.54cm" svg:y="6.209cm">
          <draw:image xlink:href="Pictures/10000001000005CE0000023C3AE40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 text:style-name="P16"><text:span text:style-name="T9">Dependency removal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p/>
          </draw:text-box>
        </draw:frame>
        <draw:frame draw:style-name="gr11" draw:text-style-name="P14" draw:layer="layout" svg:width="27.94cm" svg:height="2.972cm" svg:x="0.051cm" svg:y="13.335cm">
          <draw:text-box>
            <text:p text:style-name="P9"><text:span text:style-name="T7">Bruce, Bobby R., et al. "Jshrink: In-depth investigation into debloating modern java applications." ESEC / FSE 2020.</text:span></text:p>
            <text:p text:style-name="P9"><text:span text:style-name="T7">Latendresse, Jasmine, et al. "Not all dependencies are equal: An empirical study on production dependencies in npm." ASE 2022.</text:span></text:p>
            <text:p text:style-name="P9"><text:span text:style-name="T7">Song, Xiaohu, et al. "Efficiently trimming the fat: Streamlining software dependencies with java reflection and dependency analysis." ICSE 2024.</text:span></text:p>
            <text:p text:style-name="P9"><text:span text:style-name="T7">Drosos, Georgios-Petros, et al. "Bloat beneath python’s scales: A fine-grained inter-project dependency analysis." FSE 2024.</text:span></text:p>
            <text:p text:style-name="P9"><text:span text:style-name="T7">Liu, Yuxin, et al. "Detecting and removing bloated dependencies in CommonJS packages." JSS 2025.</text:span></text:p>
            <text:p text:style-name="P9"><text:span text:style-name="T7"/></text:p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Analyze the client / library interactions</text:span></text:p>
                <text:list>
                  <text:list-item>
                    <text:p><text:span text:style-name="T6">Statically or dynamically</text:span></text:p>
                  </text:list-item>
                  <text:list-item>
                    <text:p><text:span text:style-name="T6">Identify unused library</text:span></text:p>
                  </text:list-item>
                </text:list>
              </text:list-item>
              <text:list-item>
                <text:p><text:span text:style-name="T6">Remove unused libraries</text:span></text:p>
                <text:list>
                  <text:list-item>
                    <text:p><text:span text:style-name="T6">Rewrite the dependency file</text:span></text:p>
                  </text:list-item>
                  <text:list-item>
                    <text:p><text:span text:style-name="T6">Rewrite the binary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3.81cm" svg:height="8.795cm" svg:x="22.225cm" svg:y="5.08cm">
          <draw:image xlink:href="Pictures/100000010000017C0000036D432AF0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9">Dependency specialization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Analyze the client / library interactions</text:span></text:p>
                <text:list>
                  <text:list-item>
                    <text:p><text:span text:style-name="T6">Statically or dynamically</text:span></text:p>
                  </text:list-item>
                  <text:list-item>
                    <text:p><text:span text:style-name="T6">Identify unused library parts</text:span></text:p>
                  </text:list-item>
                </text:list>
              </text:list-item>
              <text:list-item>
                <text:p><text:span text:style-name="T6">Remove unused parts</text:span></text:p>
                <text:list>
                  <text:list-item>
                    <text:p><text:span text:style-name="T6">Mocks</text:span></text:p>
                  </text:list-item>
                  <text:list-item>
                    <text:p><text:span text:style-name="T6">Code Removal</text:span></text:p>
                  </text:list-item>
                </text:list>
                <text:p/>
              </text:list-item>
            </text:list>
          </draw:text-box>
        </draw:frame>
        <draw:frame draw:style-name="gr12" draw:text-style-name="P14" draw:layer="layout" svg:width="27.94cm" svg:height="2.048cm" svg:x="0.051cm" svg:y="13.97cm">
          <draw:text-box>
            <text:p text:style-name="P9"><text:span text:style-name="T7">Mishra, Shachee, and Michalis Polychronakis. "Shredder: Breaking exploits through API specialization." ACSAC 2018.</text:span></text:p>
            <text:p text:style-name="P9"><text:span text:style-name="T7">Soto-Valero, César, et al. "Automatic specialization of third-party java dependencies." IEEE <text:s/>TSE 2023.</text:span></text:p>
            <text:p text:style-name="P9"><text:span text:style-name="T7">Han, Jiaxuan, et al. "δ-SCALPEL: Docker Image Slimming Based on Source Code Static Analysis." IEEE TSE 2025.</text:span></text:p>
            <text:p text:style-name="P9"><text:span text:style-name="T7"/></text:p>
          </draw:text-box>
        </draw:frame>
        <draw:frame draw:style-name="gr1" draw:text-style-name="P3" draw:layer="layout" svg:width="3.825cm" svg:height="8.729cm" svg:x="22.225cm" svg:y="5.08cm">
          <draw:image xlink:href="Pictures/10000001000001790000035C8FA98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Dependency reduction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p/>
          </draw:text-box>
        </draw:frame>
        <draw:frame draw:style-name="gr13" draw:text-style-name="P14" draw:layer="layout" svg:width="27.94cm" svg:height="1.645cm" svg:x="0.051cm" svg:y="13.97cm">
          <draw:text-box>
            <text:p text:style-name="P9"><text:span text:style-name="T7">Vasilakis, Nikos, et al. "Supply-chain vulnerability elimination via active learning and regeneration." CCS 2021.</text:span></text:p>
            <text:p text:style-name="P9"><text:span text:style-name="T7">Jaisri, Pongchai, Brittany Reid, and Raula Gaikovina Kula. "A Preliminary Study on Self-contained Libraries in the NPM Ecosystem." Book chapter 2025.</text:span><text:span text:style-name="T7"><text:line-break/></text:span><text:span text:style-name="T7">Liu, Yuxin, Cristian Bogdan, and Benoit Baudry. "A Longitudinal Study of Dependency Reclassifications in JavaScript Projects." 2026.</text:span></text:p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Reduce necessary dependencies</text:span></text:p>
              </text:list-item>
              <text:list-item>
                <text:p><text:span text:style-name="T6">Regenerate</text:span></text:p>
              </text:list-item>
              <text:list-item>
                <text:p><text:span text:style-name="T6">Rewrite</text:span></text:p>
              </text:list-item>
              <text:list-item>
                <text:p><text:span text:style-name="T6">Transplant</text:span></text:p>
              </text:list-item>
            </text:list>
          </draw:text-box>
        </draw:frame>
        <draw:frame draw:style-name="gr1" draw:text-style-name="P3" draw:layer="layout" svg:width="3.955cm" svg:height="8.89cm" svg:x="21.694cm" svg:y="5.08cm">
          <draw:image xlink:href="Pictures/100000010000017C00000356846190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3">more to come this week</text:span></text:p>
          </draw:text-box>
        </draw:frame>
        <draw:frame presentation:style-name="pr6" draw:text-style-name="P17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<text:span text:style-name="T10">Galápagos: Automated N-Version Programming with LLMs</text:span></text:p>
              </text:list-item>
              <text:list-item>
                <text:p><text:span text:style-name="T10">Causes and Canonicalization of Unreproducible Builds in Java</text:span></text:p>
              </text:list-item>
              <text:list-item>
                <text:p><text:span text:style-name="T10">Understanding the Limitations of C/C++ Binary Third-Party Library Detection Tool: An Empirical Study at Scale</text:span></text:p>
              </text:list-item>
              <text:list-item>
                <text:p><text:span text:style-name="T10">Pig: Leveraging Large Language Models for Python Library Migrations</text:span></text:p>
              </text:list-item>
              <text:list-item>
                <text:p><text:span text:style-name="T10">Package Dashboard: A Cross-Ecosystem Framework for Dual-Perspective Analysis of Software Packages</text:span></text:p>
              </text:list-item>
              <text:list-item>
                <text:p><text:span text:style-name="T10">CI/CD Configuration Practices in Open-Source Android Apps: An Empirical Study</text:span></text:p>
              </text:list-item>
              <text:list-item>
                <text:p><text:span text:style-name="T10">JDetect: A Fine-Grained Detecting Method for Java Source SCA by Fusing Behavioral and Code Features</text:span></text:p>
              </text:list-item>
              <text:list-item>
                <text:p><text:span text:style-name="T10">How Can ChatGPT Support Human Security Testers to Help Mitigate Supply Chain Attacks?</text:span></text:p>
              </text:list-item>
              <text:list-item>
                <text:p><text:span text:style-name="T10">Break to Adapt: Knowledge-Based Updates of Breaking Dependencies in JavaScript</text:span></text:p>
              </text:list-item>
              <text:list-item>
                <text:p><text:span text:style-name="T10">DependaFix: A GitHub App for Fixing Breaking Dependency Updates in CI Build for Java Projects</text:span></text:p>
              </text:list-item>
              <text:list-item>
                <text:p><text:span text:style-name="T10">An Empirical Analysis of Machine Learning Model and Dataset Documentation, Supply Chain, and Licensing Challenges on Hugging Face</text:span></text:p>
              </text:list-item>
              <text:list-item>
                <text:p><text:span text:style-name="T10">Towards Predicting Multi-Vulnerability Attack Chains in Software Supply Chains from Software Bill of Materials Graphs</text:span></text:p>
              </text:list-item>
              <text:list-item>
                <text:p><text:span text:style-name="T10">Uncovering Similar but Different Packages in PyPI and Potential Security Threa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onclusion *</text:p>
          </draw:text-box>
        </draw:frame>
        <draw:frame presentation:style-name="pr6" draw:layer="layout" svg:width="25.191cm" svg:height="10.286cm" svg:x="1.399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ies ripple across the supply chain</text:p>
              </text:list-item>
              <text:list-item>
                <text:p>AI amplifies the challenges</text:p>
              </text:list-item>
              <text:list-item>
                <text:p>The supply chain can be drastically reduced</text:p>
                <text:p/>
              </text:list-item>
              <text:list-item>
                <text:p>Crew: Y. Gamage, M. Fares, N. Gonzalez, A. Nasirianfar, J. Ron, A. Sharma, F. Reyes, C. Soto-Valero, D. Tiwari, T. Durieux, M. Monperrus</text:p>
              </text:list-item>
            </text:list>
          </draw:text-box>
        </draw:frame>
        <draw:frame draw:style-name="gr14" draw:text-style-name="P15" draw:layer="layout" svg:width="27.987cm" svg:height="1.848cm" svg:x="0cm" svg:y="13.97cm">
          <draw:text-box>
            <text:p text:style-name="P12"><text:span text:style-name="T7">* “security teams do not consider rickrolling as malicious behavior”. Ladisa et al. "Journey to the center of software supply chain attacks." IEEE S&amp;P 21.6 </text:span></text:p>
            <text:p text:style-name="P12"><text:span text:style-name="T7">Spracklen, Joseph, et al. "We have a package for you! a comprehensive analysis of package hallucinations by code generating LLMs." USENIX Security 2025</text:span></text:p>
            <text:p text:style-name="P12"><text:span text:style-name="T7">Carmine Cesarano, and Martin Monperrus. “The Grand Software Supply Chain of AI Systems”. 2026</text:span></text:p>
          </draw:text-box>
        </draw:frame>
        <draw:frame draw:style-name="gr8" draw:text-style-name="P16" draw:layer="layout" svg:width="3.81cm" svg:height="3.81cm" svg:x="1.27cm" svg:y="0.635cm">
          <draw:image xlink:href="Pictures/10000001000003B1000003B17D656F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43ef1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43ef16" loext:opacity="100%" style:text-outline="false" style:text-line-through-style="none" style:text-line-through-type="none" style:font-name="Ubuntu Sans" fo:font-family="'Ubuntu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051cm" fo:margin-bottom="0cm" fo:text-indent="0cm"/>
      <style:text-properties style:font-name="Ubuntu Sans" fo:font-family="'Ubuntu Sans'" style:font-family-generic="swiss" style:font-pitch="variable" fo:font-size="22pt" style:font-size-asian="22pt" style:font-size-complex="22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text-indent="0cm"/>
      <style:text-properties style:font-name="Ubuntu Sans" fo:font-family="'Ubuntu Sans'" style:font-family-generic="swiss" style:font-pitch="variable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3ef16" loext:opacity="10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1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1:28:18.398341571</meta:creation-date>
    <dc:date>2026-07-01T08:14:26.311893301</dc:date>
    <meta:editing-duration>P3DT11H31M55S</meta:editing-duration>
    <meta:editing-cycles>43</meta:editing-cycles>
    <meta:generator>LibreOffice/26.2.4.2$Linux_X86_64 LibreOffice_project/3346a99e6b841765b75a9b29714a5b95c6761ce3</meta:generator>
    <meta:document-statistic meta:object-count="110"/>
  </office:meta>
</office:document-meta>
</file>